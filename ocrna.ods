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background-color="#ffff00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0.74pt solid #000000"/>
    </style:style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frequency </text:p>
          </table:table-cell>
          <table:table-cell table:style-name="ce1" office:value-type="string" calcext:value-type="string">
            <text:p>prescaler</text:p>
          </table:table-cell>
          <table:table-cell table:style-name="ce1" office:value-type="string" calcext:value-type="string">
            <text:p>f_cpu</text:p>
          </table:table-cell>
          <table:table-cell table:style-name="ce4" office:value-type="string" calcext:value-type="string">
            <text:p>ocrna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] / (2*[.B2]*[.A2]) - 1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] / (2*[.B3]*[.A3]) - 1" office:value-type="float" office:value="1911.04588910134" calcext:value-type="float">
            <text:p>1911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] / (2*[.B4]*[.A4]) - 1" office:value-type="float" office:value="1804.05415162455" calcext:value-type="float">
            <text:p>1804</text:p>
          </table:table-cell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] / (2*[.B5]*[.A5]) - 1" office:value-type="float" office:value="1702.57751277683" calcext:value-type="float">
            <text:p>1703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] / (2*[.B6]*[.A6]) - 1" office:value-type="float" office:value="1606.71704180064" calcext:value-type="float">
            <text:p>1607</text:p>
          </table:table-cell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7] / (2*[.B7]*[.A7]) - 1" office:value-type="float" office:value="1516.45068285281" calcext:value-type="float">
            <text:p>1516</text:p>
          </table:table-cell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8] / (2*[.B8]*[.A8]) - 1" office:value-type="float" office:value="1431.66475644699" calcext:value-type="float">
            <text:p>1432</text:p>
          </table:table-cell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9] / (2*[.B9]*[.A9]) - 1" office:value-type="float" office:value="1350.35135135135" calcext:value-type="float">
            <text:p>1350</text:p>
          </table:table-cell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0] / (2*[.B10]*[.A10]) - 1" office:value-type="float" office:value="1274.51020408163" calcext:value-type="float">
            <text:p>1275</text:p>
          </table:table-cell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1] / (2*[.B11]*[.A11]) - 1" office:value-type="float" office:value="1202.36943441637" calcext:value-type="float">
            <text:p>1202</text:p>
          </table:table-cell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2] / (2*[.B12]*[.A12]) - 1" office:value-type="float" office:value="1135.36363636364" calcext:value-type="float">
            <text:p>1135</text:p>
          </table:table-cell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3] / (2*[.B13]*[.A13]) - 1" office:value-type="float" office:value="1071.96137339056" calcext:value-type="float">
            <text:p>1072</text:p>
          </table:table-cell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4] / (2*[.B14]*[.A14]) - 1" office:value-type="float" office:value="1011.14574898785" calcext:value-type="float">
            <text:p>1011</text:p>
          </table:table-cell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5] / (2*[.B15]*[.A15]) - 1" office:value-type="float" office:value="954.109837631328" calcext:value-type="float">
            <text:p>954</text:p>
          </table:table-cell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6] / (2*[.B16]*[.A16]) - 1" office:value-type="float" office:value="900.713255184851" calcext:value-type="float">
            <text:p>901</text:p>
          </table:table-cell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7] / (2*[.B17]*[.A17]) - 1" office:value-type="float" office:value="850.063829787234" calcext:value-type="float">
            <text:p>850</text:p>
          </table:table-cell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8] / (2*[.B18]*[.A18]) - 1" office:value-type="float" office:value="802.212851405623" calcext:value-type="float">
            <text:p>802</text:p>
          </table:table-cell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19] / (2*[.B19]*[.A19]) - 1" office:value-type="float" office:value="757.150113722517" calcext:value-type="float">
            <text:p>757</text:p>
          </table:table-cell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0] / (2*[.B20]*[.A20]) - 1" office:value-type="float" office:value="714.819613457409" calcext:value-type="float">
            <text:p>715</text:p>
          </table:table-cell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1] / (2*[.B21]*[.A21]) - 1" office:value-type="float" office:value="674.675675675676" calcext:value-type="float">
            <text:p>675</text:p>
          </table:table-cell>
        </table:table-row>
        <table:table-row table:style-name="ro1"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2] / (2*[.B22]*[.A22]) - 1" office:value-type="float" office:value="636.755102040816" calcext:value-type="float">
            <text:p>637</text:p>
          </table:table-cell>
        </table:table-row>
        <table:table-row table:style-name="ro1"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3] / (2*[.B23]*[.A23]) - 1" office:value-type="float" office:value="601.046959662854" calcext:value-type="float">
            <text:p>601</text:p>
          </table:table-cell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4] / (2*[.B24]*[.A24]) - 1" office:value-type="float" office:value="567.181818181818" calcext:value-type="float">
            <text:p>567</text:p>
          </table:table-cell>
        </table:table-row>
        <table:table-row table:style-name="ro1"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5] / (2*[.B25]*[.A25]) - 1" office:value-type="float" office:value="535.193029490617" calcext:value-type="float">
            <text:p>535</text:p>
          </table:table-cell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6] / (2*[.B26]*[.A26]) - 1" office:value-type="float" office:value="505.072874493927" calcext:value-type="float">
            <text:p>505</text:p>
          </table:table-cell>
        </table:table-row>
        <table:table-row table:style-name="ro1">
          <table:table-cell table:style-name="ce2" office:value-type="float" office:value="2093" calcext:value-type="float">
            <text:p>209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7] / (2*[.B27]*[.A27]) - 1" office:value-type="float" office:value="476.783086478739" calcext:value-type="float">
            <text:p>477</text:p>
          </table:table-cell>
        </table:table-row>
        <table:table-row table:style-name="ro1">
          <table:table-cell table:style-name="ce3" office:value-type="float" office:value="2217" calcext:value-type="float">
            <text:p>22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8] / (2*[.B28]*[.A28]) - 1" office:value-type="float" office:value="450.0599909788" calcext:value-type="float">
            <text:p>450</text:p>
          </table:table-cell>
        </table:table-row>
        <table:table-row table:style-name="ro1">
          <table:table-cell table:style-name="ce3" office:value-type="float" office:value="2349" calcext:value-type="float">
            <text:p>23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29] / (2*[.B29]*[.A29]) - 1" office:value-type="float" office:value="424.71306939123" calcext:value-type="float">
            <text:p>425</text:p>
          </table:table-cell>
        </table:table-row>
        <table:table-row table:style-name="ro1">
          <table:table-cell table:style-name="ce3" office:value-type="float" office:value="2489" calcext:value-type="float">
            <text:p>248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0] / (2*[.B30]*[.A30]) - 1" office:value-type="float" office:value="400.767778224186" calcext:value-type="float">
            <text:p>401</text:p>
          </table:table-cell>
        </table:table-row>
        <table:table-row table:style-name="ro1">
          <table:table-cell table:style-name="ce3" office:value-type="float" office:value="2637" calcext:value-type="float">
            <text:p>26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1] / (2*[.B31]*[.A31]) - 1" office:value-type="float" office:value="378.218809252939" calcext:value-type="float">
            <text:p>378</text:p>
          </table:table-cell>
        </table:table-row>
        <table:table-row table:style-name="ro1">
          <table:table-cell table:style-name="ce3" office:value-type="float" office:value="2794" calcext:value-type="float">
            <text:p>279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2] / (2*[.B32]*[.A32]) - 1" office:value-type="float" office:value="356.909806728704" calcext:value-type="float">
            <text:p>357</text:p>
          </table:table-cell>
        </table:table-row>
        <table:table-row table:style-name="ro1">
          <table:table-cell table:style-name="ce3" office:value-type="float" office:value="2960" calcext:value-type="float">
            <text:p>29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3] / (2*[.B33]*[.A33]) - 1" office:value-type="float" office:value="336.837837837838" calcext:value-type="float">
            <text:p>337</text:p>
          </table:table-cell>
        </table:table-row>
        <table:table-row table:style-name="ro1">
          <table:table-cell table:style-name="ce3" office:value-type="float" office:value="3136" calcext:value-type="float">
            <text:p>31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4] / (2*[.B34]*[.A34]) - 1" office:value-type="float" office:value="317.877551020408" calcext:value-type="float">
            <text:p>318</text:p>
          </table:table-cell>
        </table:table-row>
        <table:table-row table:style-name="ro1">
          <table:table-cell table:style-name="ce3" office:value-type="float" office:value="3322" calcext:value-type="float">
            <text:p>33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5] / (2*[.B35]*[.A35]) - 1" office:value-type="float" office:value="300.023479831427" calcext:value-type="float">
            <text:p>300</text:p>
          </table:table-cell>
        </table:table-row>
        <table:table-row table:style-name="ro1">
          <table:table-cell table:style-name="ce3" office:value-type="float" office:value="3520" calcext:value-type="float">
            <text:p>35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6] / (2*[.B36]*[.A36]) - 1" office:value-type="float" office:value="283.090909090909" calcext:value-type="float">
            <text:p>283</text:p>
          </table:table-cell>
        </table:table-row>
        <table:table-row table:style-name="ro1">
          <table:table-cell table:style-name="ce3" office:value-type="float" office:value="3729" calcext:value-type="float">
            <text:p>37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7] / (2*[.B37]*[.A37]) - 1" office:value-type="float" office:value="267.16840976133" calcext:value-type="float">
            <text:p>267</text:p>
          </table:table-cell>
        </table:table-row>
        <table:table-row table:style-name="ro1">
          <table:table-cell table:style-name="ce3" office:value-type="float" office:value="3951" calcext:value-type="float">
            <text:p>395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38] / (2*[.B38]*[.A38]) - 1" office:value-type="float" office:value="252.100480890914" calcext:value-type="float">
            <text:p>252</text:p>
          </table:table-cell>
        </table:table-row>
        <table:table-row table:style-name="ro1" table:number-rows-repeated="3">
          <table:table-cell table:style-name="ce2"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3] / (2*[.B43]*[.A43]) - 1" office:value-type="float" office:value="15295.3671128107" calcext:value-type="float">
            <text:p>15295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4] / (2*[.B44]*[.A44]) - 1" office:value-type="float" office:value="14439.4332129964" calcext:value-type="float">
            <text:p>14439</text:p>
          </table:table-cell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5] / (2*[.B45]*[.A45]) - 1" office:value-type="float" office:value="13627.6201022147" calcext:value-type="float">
            <text:p>13628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6] / (2*[.B46]*[.A46]) - 1" office:value-type="float" office:value="12860.7363344051" calcext:value-type="float">
            <text:p>12861</text:p>
          </table:table-cell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7] / (2*[.B47]*[.A47]) - 1" office:value-type="float" office:value="12138.6054628225" calcext:value-type="float">
            <text:p>12139</text:p>
          </table:table-cell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8] / (2*[.B48]*[.A48]) - 1" office:value-type="float" office:value="11460.3180515759" calcext:value-type="float">
            <text:p>11460</text:p>
          </table:table-cell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49] / (2*[.B49]*[.A49]) - 1" office:value-type="float" office:value="10809.8108108108" calcext:value-type="float">
            <text:p>10810</text:p>
          </table:table-cell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0] / (2*[.B50]*[.A50]) - 1" office:value-type="float" office:value="10203.0816326531" calcext:value-type="float">
            <text:p>10203</text:p>
          </table:table-cell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1] / (2*[.B51]*[.A51]) - 1" office:value-type="float" office:value="9625.95547533093" calcext:value-type="float">
            <text:p>9626</text:p>
          </table:table-cell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2] / (2*[.B52]*[.A52]) - 1" office:value-type="float" office:value="9089.90909090909" calcext:value-type="float">
            <text:p>9090</text:p>
          </table:table-cell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3] / (2*[.B53]*[.A53]) - 1" office:value-type="float" office:value="8582.69098712446" calcext:value-type="float">
            <text:p>8583</text:p>
          </table:table-cell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4] / (2*[.B54]*[.A54]) - 1" office:value-type="float" office:value="8096.16599190283" calcext:value-type="float">
            <text:p>8096</text:p>
          </table:table-cell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5] / (2*[.B55]*[.A55]) - 1" office:value-type="float" office:value="7639.87870105062" calcext:value-type="float">
            <text:p>76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7] / (2*[.B57]*[.A57]) - 1" office:value-type="float" office:value="238.005736137667" calcext:value-type="float">
            <text:p>238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8] / (2*[.B58]*[.A58]) - 1" office:value-type="float" office:value="224.631768953069" calcext:value-type="float">
            <text:p>225</text:p>
          </table:table-cell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59] / (2*[.B59]*[.A59]) - 1" office:value-type="float" office:value="211.947189097104" calcext:value-type="float">
            <text:p>212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0] / (2*[.B60]*[.A60]) - 1" office:value-type="float" office:value="199.96463022508" calcext:value-type="float">
            <text:p>200</text:p>
          </table:table-cell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1] / (2*[.B61]*[.A61]) - 1" office:value-type="float" office:value="188.681335356601" calcext:value-type="float">
            <text:p>189</text:p>
          </table:table-cell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2] / (2*[.B62]*[.A62]) - 1" office:value-type="float" office:value="178.083094555874" calcext:value-type="float">
            <text:p>178</text:p>
          </table:table-cell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3] / (2*[.B63]*[.A63]) - 1" office:value-type="float" office:value="167.918918918919" calcext:value-type="float">
            <text:p>168</text:p>
          </table:table-cell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4] / (2*[.B64]*[.A64]) - 1" office:value-type="float" office:value="158.438775510204" calcext:value-type="float">
            <text:p>158</text:p>
          </table:table-cell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5] / (2*[.B65]*[.A65]) - 1" office:value-type="float" office:value="149.421179302046" calcext:value-type="float">
            <text:p>149</text:p>
          </table:table-cell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6] / (2*[.B66]*[.A66]) - 1" office:value-type="float" office:value="141.045454545455" calcext:value-type="float">
            <text:p>141</text:p>
          </table:table-cell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7] / (2*[.B67]*[.A67]) - 1" office:value-type="float" office:value="133.12017167382" calcext:value-type="float">
            <text:p>133</text:p>
          </table:table-cell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8] / (2*[.B68]*[.A68]) - 1" office:value-type="float" office:value="125.518218623482" calcext:value-type="float">
            <text:p>126</text:p>
          </table:table-cell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000000" calcext:value-type="float">
            <text:p>16000000</text:p>
          </table:table-cell>
          <table:table-cell table:style-name="ce5" table:formula="of:=[.C69] / (2*[.B69]*[.A69]) - 1" office:value-type="float" office:value="118.388729703916" calcext:value-type="float">
            <text:p>118</text:p>
          </table:table-cell>
        </table:table-row>
        <table:table-row table:style-name="ro1" table:number-rows-repeated="104850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-00-0000</text:date>, <text:time style:data-style-name="N2" text:time-value="15:00:54.452820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17:34:01.520928361</meta:creation-date>
    <dc:date>2026-07-16T15:04:20.922526472</dc:date>
    <meta:editing-duration>P1DT3H43M11S</meta:editing-duration>
    <meta:editing-cycles>6</meta:editing-cycles>
    <meta:generator>LibreOffice/24.2.7.2$Linux_X86_64 LibreOffice_project/420$Build-2</meta:generator>
    <meta:document-statistic meta:table-count="1" meta:cell-count="256" meta:object-count="0"/>
  </office:meta>
</office:document-meta>
</file>